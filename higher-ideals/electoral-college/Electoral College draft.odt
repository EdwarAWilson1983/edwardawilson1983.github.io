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0B00000194FFE9539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style:text-underline-style="solid" style:text-underline-width="auto" style:text-underline-color="font-color" fo:font-weight="bold" officeooo:rsid="000f154d" officeooo:paragraph-rsid="000f154d" style:font-weight-asian="bold" style:font-weight-complex="bold"/>
    </style:style>
    <style:style style:name="P2" style:family="paragraph" style:parent-style-name="Heading_20_2">
      <style:text-properties style:text-underline-style="solid" style:text-underline-width="auto" style:text-underline-color="font-color" fo:font-weight="bold" officeooo:rsid="000f154d" officeooo:paragraph-rsid="000f154d"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0f154d" style:font-weight-asian="bold" style:font-weight-complex="bold"/>
    </style:style>
    <style:style style:name="P4" style:family="paragraph" style:parent-style-name="Text_20_body" style:list-style-name="L1">
      <style:paragraph-properties fo:margin-top="0in" fo:margin-bottom="0in" style:contextual-spacing="false"/>
      <style:text-properties style:text-underline-style="solid" style:text-underline-width="auto" style:text-underline-color="font-color" fo:font-weight="bold" officeooo:rsid="000f154d" style:font-weight-asian="bold" style:font-weight-complex="bold"/>
    </style:style>
    <style:style style:name="P5" style:family="paragraph" style:parent-style-name="Text_20_body" style:list-style-name="L1">
      <style:text-properties style:text-underline-style="solid" style:text-underline-width="auto" style:text-underline-color="font-color" fo:font-weight="bold" officeooo:rsid="000f154d" style:font-weight-asian="bold" style:font-weight-complex="bold"/>
    </style:style>
    <style:style style:name="P6" style:family="paragraph" style:parent-style-name="Text_20_body" style:list-style-name="L2">
      <style:paragraph-properties fo:margin-top="0in" fo:margin-bottom="0in" style:contextual-spacing="false"/>
      <style:text-properties style:text-underline-style="solid" style:text-underline-width="auto" style:text-underline-color="font-color" fo:font-weight="bold" officeooo:rsid="000f154d" style:font-weight-asian="bold" style:font-weight-complex="bold"/>
    </style:style>
    <style:style style:name="P7" style:family="paragraph" style:parent-style-name="Text_20_body" style:list-style-name="L2">
      <style:text-properties style:text-underline-style="solid" style:text-underline-width="auto" style:text-underline-color="font-color" fo:font-weight="bold" officeooo:rsid="000f154d" style:font-weight-asian="bold" style:font-weight-complex="bold"/>
    </style:style>
    <style:style style:name="P8" style:family="paragraph" style:parent-style-name="Text_20_body" style:list-style-name="L3">
      <style:paragraph-properties fo:margin-top="0in" fo:margin-bottom="0in" style:contextual-spacing="false"/>
      <style:text-properties style:text-underline-style="solid" style:text-underline-width="auto" style:text-underline-color="font-color" fo:font-weight="bold" officeooo:rsid="000f154d" style:font-weight-asian="bold" style:font-weight-complex="bold"/>
    </style:style>
    <style:style style:name="P9" style:family="paragraph" style:parent-style-name="Text_20_body" style:list-style-name="L3">
      <style:text-properties style:text-underline-style="solid" style:text-underline-width="auto" style:text-underline-color="font-color" fo:font-weight="bold" officeooo:rsid="000f154d" style:font-weight-asian="bold" style:font-weight-complex="bold"/>
    </style:style>
    <style:style style:name="P10" style:family="paragraph" style:parent-style-name="Heading_20_1">
      <style:text-properties style:text-underline-style="solid" style:text-underline-width="auto" style:text-underline-color="font-color" fo:font-weight="bold" officeooo:rsid="000f154d" officeooo:paragraph-rsid="000f154d" style:font-weight-asian="bold" style:font-weight-complex="bold"/>
    </style:style>
    <style:style style:name="P11" style:family="paragraph" style:parent-style-name="Heading_20_2">
      <style:paragraph-properties fo:margin-top="0in" fo:margin-bottom="0.0972in" style:contextual-spacing="false" fo:line-height="115%"/>
      <style:text-properties style:text-underline-style="solid" style:text-underline-width="auto" style:text-underline-color="font-color" officeooo:rsid="000f154d"/>
    </style:style>
    <style:style style:name="P12" style:family="paragraph" style:parent-style-name="Heading_20_3">
      <style:paragraph-properties fo:margin-top="0in" fo:margin-bottom="0.0972in" style:contextual-spacing="false" fo:line-height="115%"/>
      <style:text-properties style:text-underline-style="solid" style:text-underline-width="auto" style:text-underline-color="font-color" officeooo:rsid="000f154d"/>
    </style:style>
    <style:style style:name="P13" style:family="paragraph" style:parent-style-name="Text_20_body" style:list-style-name="L4">
      <style:paragraph-properties fo:margin-top="0in" fo:margin-bottom="0in" style:contextual-spacing="false"/>
      <style:text-properties style:text-underline-style="solid" style:text-underline-width="auto" style:text-underline-color="font-color" fo:font-weight="bold" officeooo:rsid="000f154d" style:font-weight-asian="bold" style:font-weight-complex="bold"/>
    </style:style>
    <style:style style:name="P14" style:family="paragraph" style:parent-style-name="Text_20_body" style:list-style-name="L4">
      <style:text-properties style:text-underline-style="solid" style:text-underline-width="auto" style:text-underline-color="font-color" fo:font-weight="bold" officeooo:rsid="000f154d" style:font-weight-asian="bold" style:font-weight-complex="bold"/>
    </style:style>
    <style:style style:name="P15" style:family="paragraph" style:parent-style-name="Text_20_body" style:list-style-name="L5">
      <style:paragraph-properties fo:margin-top="0in" fo:margin-bottom="0in" style:contextual-spacing="false"/>
      <style:text-properties style:text-underline-style="solid" style:text-underline-width="auto" style:text-underline-color="font-color" fo:font-weight="bold" officeooo:rsid="000f154d" style:font-weight-asian="bold" style:font-weight-complex="bold"/>
    </style:style>
    <style:style style:name="P16" style:family="paragraph" style:parent-style-name="Text_20_body" style:list-style-name="L5">
      <style:text-properties style:text-underline-style="solid" style:text-underline-width="auto" style:text-underline-color="font-color" fo:font-weight="bold" officeooo:rsid="000f154d" style:font-weight-asian="bold" style:font-weight-complex="bold"/>
    </style:style>
    <style:style style:name="P17" style:family="paragraph" style:parent-style-name="Heading_20_3">
      <style:text-properties style:text-underline-style="solid" style:text-underline-width="auto" style:text-underline-color="font-color" fo:font-weight="bold" officeooo:rsid="000f154d" officeooo:paragraph-rsid="000f154d" style:font-weight-asian="bold" style:font-weight-complex="bold"/>
    </style:style>
    <style:style style:name="P18" style:family="paragraph" style:parent-style-name="Text_20_body" style:list-style-name="L6">
      <style:paragraph-properties fo:margin-top="0in" fo:margin-bottom="0in" style:contextual-spacing="false"/>
      <style:text-properties style:text-underline-style="solid" style:text-underline-width="auto" style:text-underline-color="font-color" fo:font-weight="bold" officeooo:rsid="000f154d" style:font-weight-asian="bold" style:font-weight-complex="bold"/>
    </style:style>
    <style:style style:name="P19" style:family="paragraph" style:parent-style-name="Text_20_body" style:list-style-name="L6">
      <style:text-properties style:text-underline-style="solid" style:text-underline-width="auto" style:text-underline-color="font-color" fo:font-weight="bold" officeooo:rsid="000f154d" style:font-weight-asian="bold" style:font-weight-complex="bold"/>
    </style:style>
    <style:style style:name="P20" style:family="paragraph" style:parent-style-name="Text_20_body" style:list-style-name="L7">
      <style:paragraph-properties fo:margin-top="0in" fo:margin-bottom="0in" style:contextual-spacing="false"/>
      <style:text-properties style:text-underline-style="solid" style:text-underline-width="auto" style:text-underline-color="font-color" fo:font-weight="bold" officeooo:rsid="000f154d" style:font-weight-asian="bold" style:font-weight-complex="bold"/>
    </style:style>
    <style:style style:name="P21" style:family="paragraph" style:parent-style-name="Text_20_body" style:list-style-name="L7">
      <style:text-properties style:text-underline-style="solid" style:text-underline-width="auto" style:text-underline-color="font-color" fo:font-weight="bold" officeooo:rsid="000f154d" style:font-weight-asian="bold" style:font-weight-complex="bold"/>
    </style:style>
    <style:style style:name="P22" style:family="paragraph" style:parent-style-name="Quotations">
      <style:paragraph-properties fo:margin-top="0in" fo:margin-bottom="0.0972in" style:contextual-spacing="false" fo:line-height="115%"/>
      <style:text-properties style:text-underline-style="solid" style:text-underline-width="auto" style:text-underline-color="font-color" fo:font-weight="bold" officeooo:rsid="000f154d" style:font-weight-asian="bold" style:font-weight-complex="bold"/>
    </style:style>
    <style:style style:name="P23" style:family="paragraph" style:parent-style-name="Text_20_body" style:list-style-name="L8">
      <style:paragraph-properties fo:margin-top="0in" fo:margin-bottom="0in" style:contextual-spacing="false"/>
      <style:text-properties style:text-underline-style="solid" style:text-underline-width="auto" style:text-underline-color="font-color" fo:font-weight="bold" officeooo:rsid="000f154d" style:font-weight-asian="bold" style:font-weight-complex="bold"/>
    </style:style>
    <style:style style:name="P24" style:family="paragraph" style:parent-style-name="Text_20_body" style:list-style-name="L8">
      <style:text-properties style:text-underline-style="solid" style:text-underline-width="auto" style:text-underline-color="font-color" fo:font-weight="bold" officeooo:rsid="000f154d" style:font-weight-asian="bold" style:font-weight-complex="bold"/>
    </style:style>
    <style:style style:name="P25" style:family="paragraph" style:parent-style-name="Horizontal_20_Line">
      <style:paragraph-properties fo:margin-top="0in" fo:margin-bottom="0.0972in" style:contextual-spacing="false" fo:line-height="115%"/>
      <style:text-properties style:text-underline-style="solid" style:text-underline-width="auto" style:text-underline-color="font-color" fo:font-weight="bold" officeooo:rsid="000f154d" style:font-weight-asian="bold" style:font-weight-complex="bold"/>
    </style:style>
    <style:style style:name="P26" style:family="paragraph" style:parent-style-name="Text_20_body" style:list-style-name="L9">
      <style:paragraph-properties fo:margin-top="0in" fo:margin-bottom="0in" style:contextual-spacing="false"/>
      <style:text-properties style:text-underline-style="solid" style:text-underline-width="auto" style:text-underline-color="font-color" fo:font-weight="bold" officeooo:rsid="000f154d" style:font-weight-asian="bold" style:font-weight-complex="bold"/>
    </style:style>
    <style:style style:name="P27" style:family="paragraph" style:parent-style-name="Text_20_body" style:list-style-name="L9">
      <style:text-properties style:text-underline-style="solid" style:text-underline-width="auto" style:text-underline-color="font-color" fo:font-weight="bold" officeooo:rsid="000f154d" style:font-weight-asian="bold" style:font-weight-complex="bold"/>
    </style:style>
    <style:style style:name="P28" style:family="paragraph" style:parent-style-name="Text_20_body" style:list-style-name="L10">
      <style:paragraph-properties fo:margin-top="0in" fo:margin-bottom="0in" style:contextual-spacing="false"/>
      <style:text-properties style:text-underline-style="solid" style:text-underline-width="auto" style:text-underline-color="font-color" fo:font-weight="bold" officeooo:rsid="000f154d" style:font-weight-asian="bold" style:font-weight-complex="bold"/>
    </style:style>
    <style:style style:name="P29" style:family="paragraph" style:parent-style-name="Text_20_body" style:list-style-name="L10">
      <style:text-properties style:text-underline-style="solid" style:text-underline-width="auto" style:text-underline-color="font-color" fo:font-weight="bold" officeooo:rsid="000f154d" style:font-weight-asian="bold" style:font-weight-complex="bold"/>
    </style:style>
    <style:style style:name="P30" style:family="paragraph" style:parent-style-name="Text_20_body" style:list-style-name="L11">
      <style:paragraph-properties fo:margin-top="0in" fo:margin-bottom="0in" style:contextual-spacing="false"/>
      <style:text-properties style:text-underline-style="solid" style:text-underline-width="auto" style:text-underline-color="font-color" fo:font-weight="bold" officeooo:rsid="000f154d" style:font-weight-asian="bold" style:font-weight-complex="bold"/>
    </style:style>
    <style:style style:name="P31" style:family="paragraph" style:parent-style-name="Text_20_body" style:list-style-name="L11">
      <style:text-properties style:text-underline-style="solid" style:text-underline-width="auto" style:text-underline-color="font-color" fo:font-weight="bold" officeooo:rsid="000f154d" style:font-weight-asian="bold" style:font-weight-complex="bold"/>
    </style:style>
    <style:style style:name="P32" style:family="paragraph" style:parent-style-name="Text_20_body" style:list-style-name="L12">
      <style:paragraph-properties fo:margin-top="0in" fo:margin-bottom="0in" style:contextual-spacing="false"/>
      <style:text-properties style:text-underline-style="solid" style:text-underline-width="auto" style:text-underline-color="font-color" fo:font-weight="bold" officeooo:rsid="000f154d" style:font-weight-asian="bold" style:font-weight-complex="bold"/>
    </style:style>
    <style:style style:name="P33" style:family="paragraph" style:parent-style-name="Text_20_body" style:list-style-name="L12">
      <style:text-properties style:text-underline-style="solid" style:text-underline-width="auto" style:text-underline-color="font-color" fo:font-weight="bold" officeooo:rsid="000f154d" style:font-weight-asian="bold" style:font-weight-complex="bold"/>
    </style:style>
    <style:style style:name="P34" style:family="paragraph" style:parent-style-name="Text_20_body" style:list-style-name="L13">
      <style:paragraph-properties fo:margin-top="0in" fo:margin-bottom="0in" style:contextual-spacing="false"/>
      <style:text-properties style:text-underline-style="solid" style:text-underline-width="auto" style:text-underline-color="font-color" fo:font-weight="bold" officeooo:rsid="000f154d" style:font-weight-asian="bold" style:font-weight-complex="bold"/>
    </style:style>
    <style:style style:name="P35" style:family="paragraph" style:parent-style-name="Text_20_body" style:list-style-name="L13">
      <style:text-properties style:text-underline-style="solid" style:text-underline-width="auto" style:text-underline-color="font-color" fo:font-weight="bold" officeooo:rsid="000f154d" style:font-weight-asian="bold" style:font-weight-complex="bold"/>
    </style:style>
    <style:style style:name="P36" style:family="paragraph" style:parent-style-name="Text_20_body" style:list-style-name="L14">
      <style:paragraph-properties fo:margin-top="0in" fo:margin-bottom="0in" style:contextual-spacing="false"/>
      <style:text-properties style:text-underline-style="solid" style:text-underline-width="auto" style:text-underline-color="font-color" fo:font-weight="bold" officeooo:rsid="000f154d" style:font-weight-asian="bold" style:font-weight-complex="bold"/>
    </style:style>
    <style:style style:name="P37" style:family="paragraph" style:parent-style-name="Text_20_body" style:list-style-name="L14">
      <style:text-properties style:text-underline-style="solid" style:text-underline-width="auto" style:text-underline-color="font-color" fo:font-weight="bold" officeooo:rsid="000f154d" style:font-weight-asian="bold" style:font-weight-complex="bold"/>
    </style:style>
    <style:style style:name="P38" style:family="paragraph" style:parent-style-name="Text_20_body" style:list-style-name="L15">
      <style:paragraph-properties fo:margin-top="0in" fo:margin-bottom="0in" style:contextual-spacing="false"/>
      <style:text-properties style:text-underline-style="solid" style:text-underline-width="auto" style:text-underline-color="font-color" fo:font-weight="bold" officeooo:rsid="000f154d" style:font-weight-asian="bold" style:font-weight-complex="bold"/>
    </style:style>
    <style:style style:name="P39" style:family="paragraph" style:parent-style-name="Text_20_body" style:list-style-name="L15">
      <style:text-properties style:text-underline-style="solid" style:text-underline-width="auto" style:text-underline-color="font-color" fo:font-weight="bold" officeooo:rsid="000f154d" style:font-weight-asian="bold" style:font-weight-complex="bold"/>
    </style:style>
    <style:style style:name="P40" style:family="paragraph" style:parent-style-name="Text_20_body" style:list-style-name="L16">
      <style:paragraph-properties fo:margin-top="0in" fo:margin-bottom="0in" style:contextual-spacing="false"/>
      <style:text-properties style:text-underline-style="solid" style:text-underline-width="auto" style:text-underline-color="font-color" fo:font-weight="bold" officeooo:rsid="000f154d" style:font-weight-asian="bold" style:font-weight-complex="bold"/>
    </style:style>
    <style:style style:name="P41" style:family="paragraph" style:parent-style-name="Text_20_body" style:list-style-name="L16">
      <style:text-properties style:text-underline-style="solid" style:text-underline-width="auto" style:text-underline-color="font-color" fo:font-weight="bold" officeooo:rsid="000f154d" style:font-weight-asian="bold" style:font-weight-complex="bold"/>
    </style:style>
    <style:style style:name="P42" style:family="paragraph" style:parent-style-name="Text_20_body" style:list-style-name="L17">
      <style:text-properties style:text-underline-style="solid" style:text-underline-width="auto" style:text-underline-color="font-color" fo:font-weight="bold" officeooo:rsid="000f154d" style:font-weight-asian="bold" style:font-weight-complex="bold"/>
    </style:style>
    <style:style style:name="P43" style:family="paragraph" style:parent-style-name="Text_20_body" style:list-style-name="L18">
      <style:paragraph-properties fo:margin-top="0in" fo:margin-bottom="0in" style:contextual-spacing="false"/>
      <style:text-properties style:text-underline-style="solid" style:text-underline-width="auto" style:text-underline-color="font-color" fo:font-weight="bold" officeooo:rsid="000f154d" style:font-weight-asian="bold" style:font-weight-complex="bold"/>
    </style:style>
    <style:style style:name="P44" style:family="paragraph" style:parent-style-name="Text_20_body" style:list-style-name="L18">
      <style:text-properties style:text-underline-style="solid" style:text-underline-width="auto" style:text-underline-color="font-color" fo:font-weight="bold" officeooo:rsid="000f154d" style:font-weight-asian="bold" style:font-weight-complex="bold"/>
    </style:style>
    <style:style style:name="P45" style:family="paragraph" style:parent-style-name="Text_20_body" style:list-style-name="L19">
      <style:paragraph-properties fo:margin-top="0in" fo:margin-bottom="0in" style:contextual-spacing="false"/>
      <style:text-properties style:text-underline-style="solid" style:text-underline-width="auto" style:text-underline-color="font-color" fo:font-weight="bold" officeooo:rsid="000f154d" style:font-weight-asian="bold" style:font-weight-complex="bold"/>
    </style:style>
    <style:style style:name="P46" style:family="paragraph" style:parent-style-name="Text_20_body" style:list-style-name="L19">
      <style:text-properties style:text-underline-style="solid" style:text-underline-width="auto" style:text-underline-color="font-color" fo:font-weight="bold" officeooo:rsid="000f154d" style:font-weight-asian="bold" style:font-weight-complex="bold"/>
    </style:style>
    <style:style style:name="P47" style:family="paragraph" style:parent-style-name="Text_20_body">
      <style:paragraph-properties fo:break-before="page"/>
    </style:style>
    <style:style style:name="P48" style:family="paragraph" style:parent-style-name="Quotations">
      <style:paragraph-properties fo:margin-left="0in" fo:text-indent="0in" style:auto-text-indent="false"/>
    </style:style>
    <style:style style:name="P49" style:family="paragraph" style:parent-style-name="Text_20_body">
      <style:paragraph-properties fo:margin-left="0in" fo:margin-top="0in" fo:margin-bottom="0.1965in" style:contextual-spacing="false" fo:text-indent="0in" style:auto-text-indent="false"/>
      <style:text-properties officeooo:rsid="000fc84c" officeooo:paragraph-rsid="000fc84c"/>
    </style:style>
    <style:style style:name="P50" style:family="paragraph" style:parent-style-name="Text_20_body">
      <style:paragraph-properties fo:margin-left="0in" fo:margin-top="0in" fo:margin-bottom="0.1965in" style:contextual-spacing="false" fo:text-indent="0in" style:auto-text-indent="false"/>
    </style:style>
    <style:style style:name="P51" style:family="paragraph" style:parent-style-name="Text_20_body">
      <style:paragraph-properties fo:margin-top="0in" fo:margin-bottom="0.1965in" style:contextual-spacing="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RCH TOPICS</text:p>
      <text:p text:style-name="P1"/>
      <text:p text:style-name="P1"><draw:frame draw:style-name="fr1" draw:name="Image1" text:anchor-type="char" svg:width="5.4484in" svg:height="4.2083in" draw:z-index="0"><draw:image xlink:href="Pictures/100000010000020B00000194FFE95390.png" xlink:type="simple" xlink:show="embed" xlink:actuate="onLoad" draw:mime-type="image/png"/></draw:frame></text:p>
      <text:p text:style-name="P1"/>
      <text:p text:style-name="P1"/>
      <text:p text:style-name="P1"/>
      <text:p text:style-name="P1">Part I Research</text:p>
      <text:h text:style-name="P2" text:outline-level="2">What Problem Were the Founders Trying to Solve?</text:h>
      <text:p text:style-name="P3">Research:</text:p>
      <text:list text:style-name="L1">
        <text:list-item>
          <text:p text:style-name="P4">How were executives selected in Britain? </text:p>
        </text:list-item>
        <text:list-item>
          <text:p text:style-name="P4">Why did some delegates oppose direct election? </text:p>
        </text:list-item>
        <text:list-item>
          <text:p text:style-name="P4">Literacy rates and communication limitations in 1787. </text:p>
        </text:list-item>
        <text:list-item>
          <text:p text:style-name="P4">How long did information take to travel between states? </text:p>
        </text:list-item>
        <text:list-item>
          <text:p text:style-name="P4">What did delegates mean when they warned against "mob rule"? </text:p>
        </text:list-item>
        <text:list-item>
          <text:p text:style-name="P5">Differences between democracy and republican government in Founding-era thought. </text:p>
        </text:list-item>
      </text:list>
      <text:p text:style-name="P3">Key figures:</text:p>
      <text:list text:style-name="L2">
        <text:list-item>
          <text:p text:style-name="P6">James Madison </text:p>
        </text:list-item>
        <text:list-item>
          <text:p text:style-name="P6"><text:soft-page-break/>Alexander Hamilton </text:p>
        </text:list-item>
        <text:list-item>
          <text:p text:style-name="P6">Gouverneur Morris </text:p>
        </text:list-item>
        <text:list-item>
          <text:p text:style-name="P7">James Wilson </text:p>
        </text:list-item>
      </text:list>
      <text:p text:style-name="P3">Questions:</text:p>
      <text:list text:style-name="L3">
        <text:list-item>
          <text:p text:style-name="P8">Did the Founders distrust democracy itself? </text:p>
        </text:list-item>
        <text:list-item>
          <text:p text:style-name="P9">Or did they distrust the practical realities of democracy in 1787?</text:p>
        </text:list-item>
      </text:list>
      <text:p text:style-name="P1"/>
      <text:h text:style-name="P10" text:outline-level="1">Part II Research</text:h>
      <text:h text:style-name="P11" text:outline-level="2">Why Was the Electoral College Created?</text:h>
      <text:p text:style-name="P3">This is where the slavery issue becomes central.</text:p>
      <text:p text:style-name="P3">Research:</text:p>
      <text:h text:style-name="P12" text:outline-level="3">The Three-Fifths Compromise</text:h>
      <text:p text:style-name="P3">Understand:</text:p>
      <text:list text:style-name="L4">
        <text:list-item>
          <text:p text:style-name="P13">What it was. </text:p>
        </text:list-item>
        <text:list-item>
          <text:p text:style-name="P13">Why it existed. </text:p>
        </text:list-item>
        <text:list-item>
          <text:p text:style-name="P14">How it affected House representation. </text:p>
        </text:list-item>
      </text:list>
      <text:p text:style-name="P3">Critical connection:</text:p>
      <text:p text:style-name="P3">Electoral votes equal:</text:p>
      <text:p text:style-name="P3">House seats + Senate seats</text:p>
      <text:p text:style-name="P3">Because House seats were increased by counting enslaved people at three-fifths for representation purposes, Southern states gained additional electoral votes despite enslaved people being unable to vote.</text:p>
      <text:p text:style-name="P3">This is the core argument made by many modern historians.</text:p>
      <text:p text:style-name="P3">Research questions:</text:p>
      <text:list text:style-name="L5">
        <text:list-item>
          <text:p text:style-name="P15">How many electoral votes did Southern states gain because of enslaved populations? </text:p>
        </text:list-item>
        <text:list-item>
          <text:p text:style-name="P15">Would Thomas Jefferson have defeated John Adams in 1800 without the Three-Fifths Compromise? </text:p>
        </text:list-item>
        <text:list-item>
          <text:p text:style-name="P16">What do historians mean when they say slavery influenced presidential elections? </text:p>
        </text:list-item>
      </text:list>
      <text:p text:style-name="P3">Key historian to research:</text:p>
      <text:p text:style-name="P3">Akhil Reed Amar</text:p>
      <text:p text:style-name="P1"/>
      <text:h text:style-name="P17" text:outline-level="3"><text:soft-page-break/>Constitutional Convention Debates</text:h>
      <text:p text:style-name="P3">Research:</text:p>
      <text:list text:style-name="L6">
        <text:list-item>
          <text:p text:style-name="P18">What alternatives were proposed? </text:p>
        </text:list-item>
        <text:list-item>
          <text:p text:style-name="P18">Direct popular vote? </text:p>
        </text:list-item>
        <text:list-item>
          <text:p text:style-name="P18">Congressional selection? </text:p>
        </text:list-item>
        <text:list-item>
          <text:p text:style-name="P19">State legislature selection? </text:p>
        </text:list-item>
      </text:list>
      <text:p text:style-name="P3">Look specifically for:</text:p>
      <text:list text:style-name="L7">
        <text:list-item>
          <text:p text:style-name="P20">Statements from Southern delegates. </text:p>
        </text:list-item>
        <text:list-item>
          <text:p text:style-name="P20">Statements from Northern delegates. </text:p>
        </text:list-item>
        <text:list-item>
          <text:p text:style-name="P21">Madison's writings about slavery and presidential elections. </text:p>
        </text:list-item>
      </text:list>
      <text:p text:style-name="P3">A critical question:</text:p>
      <text:p text:style-name="P22">Was the Electoral College created primarily because of slavery?</text:p>
      <text:p text:style-name="P3">Many modern writers say yes.</text:p>
      <text:p text:style-name="P3">Many constitutional scholars say it was one factor among several.</text:p>
      <text:p text:style-name="P3">Your article should investigate rather than assume.</text:p>
      <text:p text:style-name="P1"/>
      <text:h text:style-name="P10" text:outline-level="1">Part III Research</text:h>
      <text:h text:style-name="P11" text:outline-level="2">How Has the Electoral College Changed?</text:h>
      <text:p text:style-name="P3">Many Americans assume today's system is the original system.</text:p>
      <text:p text:style-name="P3">It isn't.</text:p>
      <text:p text:style-name="P3">Research:</text:p>
      <text:h text:style-name="P12" text:outline-level="3">Rise of Political Parties</text:h>
      <text:p text:style-name="P3">The Founders largely expected no parties.</text:p>
      <text:p text:style-name="P3">Then parties appeared almost immediately.</text:p>
      <text:p text:style-name="P3">Research:</text:p>
      <text:list text:style-name="L8">
        <text:list-item>
          <text:p text:style-name="P23">Election of 1796 </text:p>
        </text:list-item>
        <text:list-item>
          <text:p text:style-name="P24">Election of 1800 </text:p>
        </text:list-item>
      </text:list>
      <text:p text:style-name="P25"/>
      <text:h text:style-name="P12" text:outline-level="3">The Twelfth Amendment</text:h>
      <text:p text:style-name="P3">Research:</text:p>
      <text:list text:style-name="L9">
        <text:list-item>
          <text:p text:style-name="P26"><text:soft-page-break/>Why the original system failed. </text:p>
        </text:list-item>
        <text:list-item>
          <text:p text:style-name="P26">Jefferson vs Burr. </text:p>
        </text:list-item>
        <text:list-item>
          <text:p text:style-name="P27">How the amendment changed presidential elections. </text:p>
        </text:list-item>
      </text:list>
      <text:p text:style-name="P25"/>
      <text:h text:style-name="P12" text:outline-level="3">Winner-Take-All Rules</text:h>
      <text:p text:style-name="P3">Most people don't realize:</text:p>
      <text:p text:style-name="P3">Winner-take-all is not in the Constitution.</text:p>
      <text:p text:style-name="P3">Research:</text:p>
      <text:list text:style-name="L10">
        <text:list-item>
          <text:p text:style-name="P28">When states adopted winner-take-all systems. </text:p>
        </text:list-item>
        <text:list-item>
          <text:p text:style-name="P28">Why they adopted them. </text:p>
        </text:list-item>
        <text:list-item>
          <text:p text:style-name="P29">Which states still use alternatives. </text:p>
        </text:list-item>
      </text:list>
      <text:p text:style-name="P3">This is hugely important.</text:p>
      <text:p text:style-name="P1"/>
      <text:h text:style-name="P10" text:outline-level="1">Part IV Research</text:h>
      <text:h text:style-name="P11" text:outline-level="2">Major Criticisms</text:h>
      <text:p text:style-name="P3">Research each criticism fairly.</text:p>
      <text:h text:style-name="P12" text:outline-level="3">Popular Vote Mismatch</text:h>
      <text:p text:style-name="P3">Research:</text:p>
      <text:list text:style-name="L11">
        <text:list-item>
          <text:p text:style-name="P30">1824 </text:p>
        </text:list-item>
        <text:list-item>
          <text:p text:style-name="P30">1876 </text:p>
        </text:list-item>
        <text:list-item>
          <text:p text:style-name="P30">1888 </text:p>
        </text:list-item>
        <text:list-item>
          <text:p text:style-name="P30">2000 </text:p>
        </text:list-item>
        <text:list-item>
          <text:p text:style-name="P31">2016 </text:p>
        </text:list-item>
      </text:list>
      <text:p text:style-name="P3">Questions:</text:p>
      <text:list text:style-name="L12">
        <text:list-item>
          <text:p text:style-name="P32">Should the popular vote always determine the winner? </text:p>
        </text:list-item>
        <text:list-item>
          <text:p text:style-name="P33">What are the arguments for and against that idea? </text:p>
        </text:list-item>
      </text:list>
      <text:p text:style-name="P25"/>
      <text:h text:style-name="P12" text:outline-level="3">Swing State Politics</text:h>
      <text:p text:style-name="P3">Research:</text:p>
      <text:list text:style-name="L13">
        <text:list-item>
          <text:p text:style-name="P34">How many campaign visits occur in swing states versus safe states. </text:p>
        </text:list-item>
        <text:list-item>
          <text:p text:style-name="P35">How campaign spending is distributed. </text:p>
        </text:list-item>
      </text:list>
      <text:p text:style-name="P25"/>
      <text:h text:style-name="P12" text:outline-level="3"><text:soft-page-break/>Voter Equality</text:h>
      <text:p text:style-name="P3">Research:</text:p>
      <text:list text:style-name="L14">
        <text:list-item>
          <text:p text:style-name="P36">Why critics say votes are weighted differently. </text:p>
        </text:list-item>
        <text:list-item>
          <text:p text:style-name="P37">Small-state advantage arguments. </text:p>
        </text:list-item>
      </text:list>
      <text:p text:style-name="P25"/>
      <text:h text:style-name="P12" text:outline-level="3">Slavery Legacy Criticism</text:h>
      <text:p text:style-name="P3">This deserves its own section.</text:p>
      <text:p text:style-name="P3">Research:</text:p>
      <text:list text:style-name="L15">
        <text:list-item>
          <text:p text:style-name="P38">Modern scholarly arguments connecting the Electoral College to slavery. </text:p>
        </text:list-item>
        <text:list-item>
          <text:p text:style-name="P39">Counterarguments from constitutional scholars. </text:p>
        </text:list-item>
      </text:list>
      <text:p text:style-name="P3">This should be one of the most researched sections in the article.</text:p>
      <text:p text:style-name="P1"/>
      <text:p text:style-name="P1"/>
      <text:h text:style-name="P10" text:outline-level="1">Part V Research</text:h>
      <text:h text:style-name="P11" text:outline-level="2">Major Defenses</text:h>
      <text:p text:style-name="P3">If you're going to criticize fairly, you must defend fairly.</text:p>
      <text:p text:style-name="P3">Research:</text:p>
      <text:h text:style-name="P12" text:outline-level="3">Federalism</text:h>
      <text:p text:style-name="P3">Argument:</text:p>
      <text:p text:style-name="P3">The United States is a union of states, not merely a national electorate.</text:p>
      <text:p text:style-name="P3">Questions:</text:p>
      <text:list text:style-name="L16">
        <text:list-item>
          <text:p text:style-name="P40">What is federalism? </text:p>
        </text:list-item>
        <text:list-item>
          <text:p text:style-name="P41">Why did the Founders value it? </text:p>
        </text:list-item>
      </text:list>
      <text:p text:style-name="P25"/>
      <text:h text:style-name="P12" text:outline-level="3">Coalition Building</text:h>
      <text:p text:style-name="P3">Research:</text:p>
      <text:list text:style-name="L17">
        <text:list-item>
          <text:p text:style-name="P42">Why supporters say candidates must build geographically broad support. </text:p>
        </text:list-item>
      </text:list>
      <text:p text:style-name="P25"/>
      <text:h text:style-name="P12" text:outline-level="3">Stability</text:h>
      <text:p text:style-name="P3">Research:</text:p>
      <text:list text:style-name="L18">
        <text:list-item>
          <text:p text:style-name="P43"><text:soft-page-break/>How often presidential election results are disputed. </text:p>
        </text:list-item>
        <text:list-item>
          <text:p text:style-name="P44">Comparison with parliamentary systems. </text:p>
        </text:list-item>
      </text:list>
      <text:p text:style-name="P25"/>
      <text:h text:style-name="P12" text:outline-level="3">Protection Against Regional Candidates</text:h>
      <text:p text:style-name="P3">Research:</text:p>
      <text:list text:style-name="L19">
        <text:list-item>
          <text:p text:style-name="P45">Could a candidate win solely by dominating major metropolitan areas? </text:p>
        </text:list-item>
        <text:list-item>
          <text:p text:style-name="P46">Is this concern still realistic?</text:p>
        </text:list-item>
      </text:list>
      <text:p text:style-name="P1"/>
      <text:p text:style-name="P1"/>
      <text:h text:style-name="P10" text:outline-level="1">Part VI Research</text:h>
      <text:h text:style-name="P11" text:outline-level="2">The Real Question</text:h>
      <text:p text:style-name="P3">This is where Higher Ideals shines.</text:p>
      <text:p text:style-name="P3">Instead of asking:</text:p>
      <text:p text:style-name="P22">Is the Electoral College good?</text:p>
      <text:p text:style-name="P3">Ask:</text:p>
      <text:p text:style-name="P22">Does it still solve the problem it was designed to solve?</text:p>
      <text:p text:style-name="P3">Research:</text:p>
      <text:h text:style-name="P12" text:outline-level="3">Which Founding-Era Problems Still Exist?</text:h>
      <text:p text:style-name="P3">Information scarcity?</text:p>
      <text:p text:style-name="P3">No.</text:p>
      <text:p text:style-name="P3">Regional divisions?</text:p>
      <text:p text:style-name="P3">Absolutely.</text:p>
      <text:p text:style-name="P3">Factionalism?</text:p>
      <text:p text:style-name="P3">Definitely.</text:p>
      <text:p text:style-name="P3">State sovereignty concerns?</text:p>
      <text:p text:style-name="P3">Still debated.</text:p>
      <text:p text:style-name="P25"/>
      <text:h text:style-name="P12" text:outline-level="3">Which Problems Have Changed?</text:h>
      <text:p text:style-name="P3">Mass media.</text:p>
      <text:p text:style-name="P3"><text:soft-page-break/>Internet.</text:p>
      <text:p text:style-name="P3">Universal suffrage.</text:p>
      <text:p text:style-name="P3">Political parties.</text:p>
      <text:p text:style-name="P3">National campaigns.</text:p>
      <text:p text:style-name="P3">Instant communication.</text:p>
      <text:p text:style-name="P25"/>
      <text:h text:style-name="P12" text:outline-level="3">Final Research Question</text:h>
      <text:p text:style-name="P3">This may become your concluding thesis:</text:p>
      <text:p text:style-name="P22">If Americans were designing a presidential election system from scratch today, knowing everything we know now, would we create the Electoral College?</text:p>
      <text:p text:style-name="P3">That question allows readers to wrestle with the institution's history—including its connection to slavery—while also evaluating its modern relevance.</text:p>
      <text:p text:style-name="P3">For a Higher Ideals article, I would devote roughly <text:span text:style-name="Strong_20_Emphasis">25–30% of the entire piece to slavery, the Three-Fifths Compromise, and Southern political power</text:span>, because it is historically significant and often either ignored or overstated. The strongest version of this article will examine that influence carefully, using primary sources and competing scholarly interpretations, rather than treating it as either the sole reason for the Electoral College or an irrelevant footnote.</text:p>
      <text:p text:style-name="P1"/>
      <text:p text:style-name="P1">THE ELECTORAL COLLEGE:<text:line-break/>AN INSTITUTION BUILT FOR A DIFFERENT AMERICA?</text:p>
      <text:p text:style-name="P3">Subtitle:<text:line-break/>Understanding Why It Exists, How It Changed, and Whether It Still Serves Its Purpose</text:p>
      <text:p text:style-name="P3">INTRODUCTION</text:p>
      <text:p text:style-name="P3">Every four years, Americans hear the same argument.</text:p>
      <text:p text:style-name="P3">Some claim the Electoral College protects the voice of smaller states and prevents presidential campaigns from focusing solely on major population centers.</text:p>
      <text:p text:style-name="P3">Others argue it undermines democratic principles by allowing a candidate to win the presidency without winning the national popular vote.</text:p>
      <text:p text:style-name="P3">The debate is often passionate, highly partisan, and frequently reduced to slogans.</text:p>
      <text:p text:style-name="P3">Yet before deciding whether the Electoral College should be preserved, reformed, or abolished, a more fundamental question must be answered:</text:p>
      <text:p text:style-name="P3">Why was it created in the first place?</text:p>
      <text:p text:style-name="P3"><text:soft-page-break/>Institutions do not emerge from thin air. They are designed to solve specific problems, reflect specific values, and operate within the realities of their time.</text:p>
      <text:p text:style-name="P3">The Electoral College was no exception.</text:p>
      <text:p text:style-name="P3">Created during the Constitutional Convention of 1787, it emerged from a nation vastly different from the United States of today—a country without political parties, without modern communications, without national campaigns, and still deeply divided over the institution of slavery.</text:p>
      <text:p text:style-name="P3">More than two centuries later, Americans continue to use the same basic framework to choose their president.</text:p>
      <text:p text:style-name="P3">The question is not simply whether the Electoral College is democratic or undemocratic.</text:p>
      <text:p text:style-name="P3">The more important question is whether an institution designed for the challenges of the eighteenth century remains the best mechanism for governing a twenty-first-century republic.</text:p>
      <text:p text:style-name="P3">PART I<text:line-break/>THE PROBLEM: CHOOSING A PRESIDENT IN 1787</text:p>
      <text:p text:style-name="P3">Key Questions:</text:p>
      <text:p text:style-name="P3">• Why did the founders reject monarchy?<text:line-break/>• Why were many delegates skeptical of direct democracy?<text:line-break/>• Why did others oppose congressional selection?<text:line-break/>• How did communication limitations affect political decision-making?<text:line-break/>• What did the founders mean by a republic?<text:line-break/>• How did slavery complicate presidential elections?</text:p>
      <text:p text:style-name="P3">Main Themes:</text:p>
      <text:p text:style-name="P3">• Fear of concentrated power<text:line-break/>• Fear of uninformed voting<text:line-break/>• Executive independence<text:line-break/>• Federalism<text:line-break/>• Regional interests<text:line-break/>• Slavery</text:p>
      <text:p text:style-name="P3">Ending Thesis:</text:p>
      <text:p text:style-name="P3">The delegates were not trying to solve one problem. They were trying to solve several competing problems simultaneously, and no proposed system satisfied every faction.</text:p>
      <text:p text:style-name="P3">PART II<text:line-break/>THE COMPROMISE: HOW THE ELECTORAL COLLEGE EMERGED</text:p>
      <text:p text:style-name="P3">Key Questions:</text:p>
      <text:p text:style-name="P3">• What alternatives were debated?<text:line-break/>• Why was direct election rejected?<text:line-break/><text:soft-page-break/>• Why was congressional selection rejected?<text:line-break/>• How did the Three-Fifths Compromise affect presidential elections?<text:line-break/>• What role did slavery play?<text:line-break/>• What did Madison mean when he described slavery as a difficulty for direct election?</text:p>
      <text:p text:style-name="P3">Main Themes:</text:p>
      <text:p text:style-name="P3">• Constitutional Convention debates<text:line-break/>• Madison's July 19 remarks<text:line-break/>• Three-Fifths Compromise<text:line-break/>• Northern vs Southern interests<text:line-break/>• Large-state vs small-state concerns<text:line-break/>• Final constitutional design</text:p>
      <text:p text:style-name="P3">Ending Thesis:</text:p>
      <text:p text:style-name="P3">The Electoral College emerged not because the delegates agreed on a single principle, but because it represented the most politically acceptable compromise among several competing interests.</text:p>
      <text:p text:style-name="P3">PART III<text:line-break/>THE TRANSFORMATION: THE SYSTEM THE FOUNDERS CREATED IS NOT THE SYSTEM WE USE TODAY</text:p>
      <text:p text:style-name="P3">Key Questions:</text:p>
      <text:p text:style-name="P3">• How did political parties change the Electoral College?<text:line-break/>• What happened in the election of 1800?<text:line-break/>• Why was the Twelfth Amendment necessary?<text:line-break/>• How did winner-take-all become dominant?<text:line-break/>• Why did electors stop acting independently?</text:p>
      <text:p text:style-name="P3">Main Themes:</text:p>
      <text:p text:style-name="P3">• Election of 1796<text:line-break/>• Election of 1800<text:line-break/>• Jefferson and Burr<text:line-break/>• Twelfth Amendment<text:line-break/>• Rise of political parties<text:line-break/>• Winner-take-all voting<text:line-break/>• Evolution of the modern Electoral College</text:p>
      <text:p text:style-name="P3">Ending Thesis:</text:p>
      <text:p text:style-name="P3">The modern Electoral College is not the system most Americans believe the founders created. Over time, political parties and state laws fundamentally transformed its operation.</text:p>
      <text:p text:style-name="P3">PART IV<text:line-break/>DOES IT STILL SERVE ITS PURPOSE?</text:p>
      <text:p text:style-name="P3"><text:soft-page-break/>Key Questions:</text:p>
      <text:p text:style-name="P3">• What arguments exist in favor of the Electoral College?<text:line-break/>• What criticisms exist today?<text:line-break/>• Does it still protect federalism?<text:line-break/>• Does it still encourage broad coalitions?<text:line-break/>• Does it overemphasize swing states?<text:line-break/>• How should Americans evaluate institutions created under different historical conditions?</text:p>
      <text:p text:style-name="P3">Main Themes:</text:p>
      <text:p text:style-name="P3">Arguments in Favor:<text:line-break/>• Federalism<text:line-break/>• Coalition building<text:line-break/>• Stability<text:line-break/>• Regional balance</text:p>
      <text:p text:style-name="P3">Arguments Against:<text:line-break/>• Popular vote mismatches<text:line-break/>• Swing-state dominance<text:line-break/>• Unequal vote influence<text:line-break/>• Slavery legacy concerns</text:p>
      <text:p text:style-name="P3">Final Question:</text:p>
      <text:p text:style-name="P3">If Americans were designing a presidential election system from scratch today, knowing everything we know now, would we create the Electoral College?</text:p>
      <text:p text:style-name="P3">CONCLUSION</text:p>
      <text:p text:style-name="P3">The Electoral College was not created to solve a single problem. It emerged from a nation struggling to balance democracy, federalism, executive independence, regional interests, and slavery.</text:p>
      <text:p text:style-name="P3">For more than two centuries, it has shaped the way Americans choose their presidents. Yet the system in use today differs substantially from the one envisioned in 1787.</text:p>
      <text:p text:style-name="P3">Whether the Electoral College should be preserved, reformed, or replaced remains a matter of legitimate disagreement.</text:p>
      <text:p text:style-name="P3">But meaningful debate requires historical understanding.</text:p>
      <text:p text:style-name="P3">The question is not whether the Electoral College once served a purpose.</text:p>
      <text:p text:style-name="P3">The question is whether that purpose still exists in the America of today.</text:p>
      <text:p text:style-name="P1"/>
      <text:p text:style-name="P47"/>
      <text:p text:style-name="P47">Every four years, Americans hear the same argument.</text:p>
      <text:p text:style-name="Text_20_body">Some claim the Electoral College protects the voice of smaller states and prevents presidential campaigns from focusing solely on major population centers.</text:p>
      <text:p text:style-name="Text_20_body">Others argue it undermines democratic principles by allowing a candidate to win the presidency without winning the national popular vote.</text:p>
      <text:p text:style-name="Text_20_body">The debate is often passionate, highly partisan, and frequently reduced to slogans.</text:p>
      <text:p text:style-name="Text_20_body">Yet before deciding whether the Electoral College should be preserved, reformed, or abolished, a more fundamental question must be answered:</text:p>
      <text:p text:style-name="Text_20_body">Why was it created in the first place?</text:p>
      <text:p text:style-name="Text_20_body">Institutions do not emerge from thin air. They are designed to solve specific problems, reflect specific values, and operate within the realities of their time.</text:p>
      <text:p text:style-name="Text_20_body">The Electoral College was no exception.</text:p>
      <text:p text:style-name="Text_20_body">Created during the Constitutional Convention of 1787, it emerged from a nation vastly different from the United States of today—a country without political parties, without modern communications, without national campaigns, and without a fully developed understanding of democratic governance.</text:p>
      <text:p text:style-name="Text_20_body">More than two centuries later, Americans continue to use the same basic framework to choose their president.</text:p>
      <text:p text:style-name="Text_20_body">The question is not simply whether the Electoral College is democratic or undemocratic.</text:p>
      <text:p text:style-name="Text_20_body">The more important question is whether an institution designed for the challenges of the eighteenth century remains the best mechanism for governing a twenty-first-century republic.</text:p>
      <text:p text:style-name="Text_20_body">To answer that question, we must first understand the problem the Founders were trying to solve.</text:p>
      <text:p text:style-name="Standard"/>
      <text:h text:style-name="Heading_20_2" text:outline-level="2">The Problem the Founders Were Trying to Solve</text:h>
      <text:p text:style-name="Text_20_body"/>
      <text:p text:style-name="P48">To modern Americans, electing a president through a direct national vote may seem obvious. In 1787, however, the idea raised serious concerns among the delegates gathered in Philadelphia.</text:p>
      <text:p text:style-name="P48">The United States was a young nation spread across thousands of miles of territory. Information traveled slowly. Most citizens would never meet a presidential candidate, hear them speak, or have reliable information about political figures outside their own region.</text:p>
      <text:p text:style-name="P48">The Founders therefore faced a difficult challenge:</text:p>
      <text:p text:style-name="P48">How could a republic allow citizens to choose a president while also protecting against uninformed decision-making, regional favoritism, and the concentration of political power?</text:p>
      <text:p text:style-name="P48"/>
      <text:p text:style-name="P49"><text:soft-page-break/>Conclusion</text:p>
      <text:p text:style-name="P50">The debate over the Electoral College is not simply about elections. It is ultimately a debate about the nature of American democracy itself. The founders designed the institution to address the realities of the eighteenth century—a nation divided by distance, limited communication, and competing state interests. More than two centuries later, Americans live in a vastly different political and technological environment.</text:p>
      <text:p text:style-name="P51">Whether the Electoral College should be preserved, reformed, or replaced remains a matter of legitimate disagreement. Yet before deciding its future, citizens must first understand its past. The question is not whether the Electoral College once served a purpose. The question is whether that purpose still exists in the America of today.</text:p>
      <text:p text:style-name="P48"/>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20T22:31:40.803572600</meta:creation-date>
    <dc:date>2026-06-21T21:22:48.553793000</dc:date>
    <meta:editing-duration>PT3H31M11S</meta:editing-duration>
    <meta:editing-cycles>6</meta:editing-cycles>
    <meta:generator>LibreOffice/25.8.7.3$Windows_X86_64 LibreOffice_project/30742500f2d3eb4366ac312fa33d3dcabdb3eba5</meta:generator>
    <meta:document-statistic meta:table-count="0" meta:image-count="1" meta:object-count="0" meta:page-count="13" meta:paragraph-count="226" meta:word-count="2049" meta:character-count="13638" meta:non-whitespace-character-count="11823"/>
  </office:meta>
</office:document-meta>
</file>