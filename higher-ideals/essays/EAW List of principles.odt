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6f04" officeooo:paragraph-rsid="00106f04"/>
    </style:style>
    <style:style style:name="P2" style:family="paragraph" style:parent-style-name="Standard">
      <style:text-properties officeooo:rsid="0010b8d2" officeooo:paragraph-rsid="0010b8d2"/>
    </style:style>
    <style:style style:name="P3" style:family="paragraph" style:parent-style-name="Standard">
      <style:text-properties officeooo:rsid="0011f38c" officeooo:paragraph-rsid="0011f38c"/>
    </style:style>
    <style:style style:name="P4" style:family="paragraph" style:parent-style-name="Standard">
      <style:text-properties officeooo:rsid="0011f430" officeooo:paragraph-rsid="0011f430"/>
    </style:style>
    <style:style style:name="P5" style:family="paragraph" style:parent-style-name="Standard">
      <style:text-properties officeooo:rsid="00138be0" officeooo:paragraph-rsid="00138be0"/>
    </style:style>
    <style:style style:name="P6" style:family="paragraph" style:parent-style-name="Standard">
      <style:text-properties officeooo:rsid="0013c30b" officeooo:paragraph-rsid="0013c30b"/>
    </style:style>
    <style:style style:name="P7" style:family="paragraph" style:parent-style-name="Standard">
      <style:text-properties officeooo:rsid="0014f2df" officeooo:paragraph-rsid="0014f2df"/>
    </style:style>
    <style:style style:name="P8" style:family="paragraph" style:parent-style-name="Standard">
      <style:text-properties officeooo:rsid="001563ff" officeooo:paragraph-rsid="001563ff"/>
    </style:style>
    <style:style style:name="P9" style:family="paragraph" style:parent-style-name="Standard">
      <style:text-properties officeooo:rsid="0016c8cb" officeooo:paragraph-rsid="0016c8cb"/>
    </style:style>
    <style:style style:name="T1" style:family="text">
      <style:text-properties officeooo:rsid="0010b8d2"/>
    </style:style>
    <style:style style:name="T2" style:family="text">
      <style:text-properties officeooo:rsid="0011f38c"/>
    </style:style>
    <style:style style:name="T3" style:family="text">
      <style:text-properties officeooo:rsid="0011f430"/>
    </style:style>
    <style:style style:name="T4" style:family="text">
      <style:text-properties officeooo:rsid="00138be0"/>
    </style:style>
    <style:style style:name="T5" style:family="text">
      <style:text-properties officeooo:rsid="001563ff"/>
    </style:style>
    <style:style style:name="T6" style:family="text">
      <style:text-properties officeooo:rsid="0013c30b"/>
    </style:style>
    <style:style style:name="T7" style:family="text">
      <style:text-properties officeooo:rsid="0014f2df"/>
    </style:style>
    <style:style style:name="T8" style:family="text">
      <style:text-properties officeooo:rsid="0016c8cb"/>
    </style:style>
    <style:style style:name="T9" style:family="text">
      <style:text-properties officeooo:rsid="001753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What frustrates me about modern politics?<text:line-break/>I’d say first and foremost, the total inconsistency of political philosophy by the far right and disingenuous victimizing of minorities and less fortunate. Example, I find that the far right in this country now take to doing onto others as they complain is being done unto them. If Donald Trump can mock Joe Biden because of his age, calling him “Sleepy Joe” but then himself continually fall asleep in public and expect no criticism in return (for just an example) is the sheer example of why we as a nation can not communicate. Personally, I can not communicate or debate in good faith is the policy shall be “rules for thee not for me”.</text:p>
      <text:p text:style-name="P1">Second, I find what I feel is the sheer hate by the extreme right upon those who look, sound, think, or worship differently to be at best shameful and at worst a clear and present danger to the foundational structure of the nation going forward. While I personally believe in left leaning political ideals (I consider myself an FDR Democrat/Democratic Socialist) I would certainly settle for a return to a time when both sides could argue and/or debate in good faith in an effort to bring about a more perfect union. <text:span text:style-name="T1">I specifically say the “extreme right” because though I may rarely agree with the conservative line of thinking, I wholly believe that there is a place in government for the ideology just like there should be a place for liberal ideals. What there isn’t a place for (in my opinion) is far right (or extreme far left for that matter) violence and organized hate.</text:span></text:p>
      <text:p text:style-name="P2">Third, I find the sheer inability of Democrats to largely resist against the systematic dismantling and destruction of Political and Governmental norms in US Society entirely frustrating. My political philosophy for the party is that we, as Democrats who care about the direction that the government is moving and desiring to leave the next generation not only a functional democracy (which I feel the far right is seeking to dissolve), need to strategically continue to apply political pressure and (for lack of a better analogy) refuse to ever retreat. I feel like we need to look at the current political climate much like the view US Grant took in executing the Union Army’s plans in the Civil War. Always move forward and never retreat. It is generally better to lose being aggressive (in terms of a political strategy) then to lose being on the defensive.</text:p>
      <text:p text:style-name="P2"/>
      <text:p text:style-name="P2">2) What problems do I think are most important?</text:p>
      <text:p text:style-name="P2">Unfortunately we currently find ourselves in a situation where resisting the far right MAGA movement in an attempt to preserve what our parents left us would seem to be most pertinent at this time. If we could put that aside for a moment, I would list issues including Gun violence, domestic violence, fixing Social Security, <text:span text:style-name="T2">drastically raising the federal minimum wage, universal healthcare, curtailing the the grip that the military industrial complex holds on our nation, protecting our civil rights and liberties which too often recently seem to be set aside for temporary safety, equality for all and specifically those more marginalized like LGBTQ, women and african american communities. And generally the ability of every American to seek their pursuit of happiness without government deciding which American deserve the privilege.</text:span></text:p>
      <text:p text:style-name="P2"/>
      <text:p text:style-name="P3">3) What role should government play?</text:p>
      <text:p text:style-name="P3">Simply put, Government must act as a referee who assure that all parties are playing by a fair and similar set of rules. It must maintain the social balance between the poorest and wealthiest, largest corps and smallest family business. Additionally, Government has an interest in being able to help those who can not help themselves. We live in the most powerful and wealthy nation in world history. There is no logical reason why anyone in this nation should be forced to go hungry, be sick, not be able to afford education, or be forced to chose between healthcare or food. Government has the unique ability to solve these issues for all, at a relative lower cost versus what a small group of private entities can do. Social Security, for me, proves this beyond a doubt. Finally, Government has a definite role to protect its citizens, though that role can certainly be overdone. Defense doe not always = offensive military action in the name of defense. Sometimes offense is just offense.</text:p>
      <text:p text:style-name="P3"><text:soft-page-break/>4) What role should citizens play?</text:p>
      <text:p text:style-name="P3"><text:span text:style-name="T3">Generally, when it comes to government, citizens should involve themselves in government to the extent that they not only feel conferrable and needed, but citizenry should be well educated as to the inner workings of how government works and why. Additionally, the citizenry is required to act as a check on ALL branches of formal government and even those of informal government. For example, the media is not a formal branch of government, but as an informal branch and important check, it is indispensable in order to check government and to inform the citizenry which in turn can add an additional check on government. <text:s/>In the end, government is supposed to be in place to serve the public so the average citizen can live a free a fruitful life. When the tables flip and the citizen is expected to serve the government, we lose democracy in favor of totalitarianism.</text:span></text:p>
      <text:p text:style-name="P3"/>
      <text:p text:style-name="P4">5) <text:span text:style-name="T4">What political thinkers have influenced me?</text:span></text:p>
      <text:p text:style-name="P5">Many. Historically (and being born and raised in Philadelphia where American history is very important) the thinking of Benjamin Franklin loom large on my view of fundamental government. Many of his political ideas come to mind every time I contemplate current political problems. Many of my ideas about what government SHOULD be and SHOULD do and how citizens SHOULD interact and what they SHOULD expect from government largely comes from the political writings and philosophy of Benjamin Franklin. I also very much admire the masterful diplomatic abilities of Franklin. When it comes to ideas and examples of what government can do and can be, I look to the two Roosevelts. TR in terms of taking control and using presidential power for the betterment of the <text:span text:style-name="T5">public and</text:span> nation rather than the interests of the few wealthiest among us. The idea that we should leave this country better than we received it, the idea that the beauty of the natural nation should be protected for future generations and the idea that government should act as an agent to bring about positive social change. FDR in terms of taking “big swings” at big ideas to solve big problems. The idea that creative thinking should prevail when trying to solve these big issues and that politically <text:span text:style-name="T6">aggressive philosophies can prevail when we face large problems. I admire JFK for his ability to communicate and encourage the citizenry to dream big. More contemporary, I very much admire politicians like Bernie Sanders, AOC, Jasmine Crockett and former Philadelphia Mayor/Pennsylvania Governor Ed Rendell. They all exhibit the willingness to wield power and national fortune to bring about the betterment of the average citizen. I’ll also say that I was very much also shaped by the political ideologies of George Carlin and John Lennon. Though not involved in politics directly, they contribute largely to many of my ideas about political right and wrong.</text:span></text:p>
      <text:p text:style-name="P5"/>
      <text:p text:style-name="P6">6) <text:span text:style-name="T7">What makes me different from the average Democrat, Republican, Libertarian, etc?</text:span></text:p>
      <text:p text:style-name="P7">Simply put, while I obviously need to work to live, I do not seek a role in this field to become wealthy or to garner power and influence. I have a very specific series of morals and principles that I believe in strongly and, I believe, a political strategy to help bring them about. Bettering society is far more important that being wealthy or powerful. Making sure that everyone has access to the fundamental needs every person requires and then the ability to pursue their own version of happiness should be the goal. It is mine. Too many politicians are concerned with enriching themselves and keeping their jobs rather than truly helping those whom sent them to government. I believe that government is a place to come together and solve problems, it should not be seen as a career. I’m not looking to become rich doing this job, I’m looking to make society better.</text:p>
      <text:p text:style-name="P7"/>
      <text:p text:style-name="P8">7) What do I want to work on?</text:p>
      <text:p text:style-name="P8">I want to help save democracy first, better life for society next. How do we do that? First though civic education and then through slowly reforming the process so that, for example, a 90+ year old man is not running for an additional term in the Senate. <text:span text:style-name="T8">We need to ensure that money does not equal more access to government. We need a more fair presidential election process that more represents a 2026 </text:span><text:soft-page-break/><text:span text:style-name="T8">electorate and doesn’t unfairly favor the elite over less well off. I believe we need to reexamine the foundations and principles that the founders laid out while also understanding that modernization is needed. More immediately I’d like to help in the sphere of Domestic Violence and perhaps help get politicians elected who can ACTUALLY lead us in the direction I laid out above. I would certainly be open to doing this on a local level or federal level. I’d also be opening to achieving these goals through anything from advocacy, lobbying or in direct government work.</text:span></text:p>
      <text:p text:style-name="P8"/>
      <text:p text:style-name="P9">8) What job am I actually looking for?<text:line-break/><text:span text:style-name="T9">I’m interested in any job that will, honestly, pay be fairly so I can afford to live while also chasing down the goals I laid out above. I have interest in political communications (whether that be in activism or working in a communication dept), Lobbying, political analyst/consultant, advocacy, work in non profits and maybe (some day if the situation were right) elected office. Right now I’m open to many possible roles so I can get started and see where I can go from the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5T23:13:17.818854700</meta:creation-date>
    <dc:date>2026-06-06T00:35:06.268933600</dc:date>
    <meta:editing-duration>PT56M40S</meta:editing-duration>
    <meta:editing-cycles>8</meta:editing-cycles>
    <meta:generator>LibreOffice/26.2.4.2$Windows_X86_64 LibreOffice_project/0229ac93fcf0d7cbc6376066c6f35021cef002dc</meta:generator>
    <meta:document-statistic meta:table-count="0" meta:image-count="0" meta:object-count="0" meta:page-count="3" meta:paragraph-count="16" meta:word-count="1649" meta:character-count="9689" meta:non-whitespace-character-count="8055"/>
  </office:meta>
</office:document-meta>
</file>